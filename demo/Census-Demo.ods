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29in"/>
    </style:style>
    <style:style style:name="co2" style:family="table-column">
      <style:table-column-properties fo:break-before="auto" style:column-width="2.5591in"/>
    </style:style>
    <style:style style:name="co3" style:family="table-column">
      <style:table-column-properties fo:break-before="auto" style:column-width="4.724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 table:null-year="1950"/>
      <table:table table:name="Census Dem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US Census Calc Add-In - dem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cf86b3a19d67b30a3b684b43c50d87d55f16b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 pass the key per formula (last arg), e.g. =CENSUS_VALUE(2022;"acs/acs5";"B01003_001E";"state:06";"";$B$1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ive result</text:p>
          </table:table-cell>
          <table:table-cell office:value-type="string" calcext:value-type="string">
            <text:p>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SUS_VALUE NAME (California)</text:p>
          </table:table-cell>
          <table:table-cell table:formula="of:=COM.EXAMPLE.CENSUS.CENSUSIMPL.CENSUSVALUE(2022;&quot;acs/acs5&quot;;&quot;NAME&quot;;&quot;state:06&quot;; ;[.A2])" office:value-type="string" office:string-value="California" calcext:value-type="string">
            <text:p>California</text:p>
          </table:table-cell>
          <table:table-cell table:style-name="ce1" office:value-type="string" calcext:value-type="string">
            <text:p>=CENSUS_VALUE(2022;"acs/acs5";"NAME";"state:06"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SUS_VALUE population (California)</text:p>
          </table:table-cell>
          <table:table-cell table:formula="of:=COM.EXAMPLE.CENSUS.CENSUSIMPL.CENSUSVALUE(2022;&quot;acs/acs5&quot;;&quot;B01003_001E&quot;;&quot;state:06&quot;; ;[.A2])" office:value-type="float" office:value="39356104" calcext:value-type="float">
            <text:p>39356104</text:p>
          </table:table-cell>
          <table:table-cell table:style-name="ce1" office:value-type="string" calcext:value-type="string">
            <text:p>=CENSUS_VALUE(2022;"acs/acs5";"B01003_001E";"state:06"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SUS_VARLABEL (population variable)</text:p>
          </table:table-cell>
          <table:table-cell table:formula="of:=COM.EXAMPLE.CENSUS.CENSUSIMPL.CENSUSVARLABEL(2022;&quot;acs/acs5&quot;;&quot;B01003_001E&quot;)" office:value-type="string" office:string-value="Estimate!!Total" calcext:value-type="string">
            <text:p>Estimate!!Total</text:p>
          </table:table-cell>
          <table:table-cell table:style-name="ce1" office:value-type="string" calcext:value-type="string">
            <text:p>=CENSUS_VARLABEL(2022;"acs/acs5";"B01003_001E"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ENSUS_GET (array formula, NAME + population for CA/NY/TX)</text:p>
          </table:table-cell>
          <table:table-cell table:number-columns-repeated="5"/>
        </table:table-row>
        <table:table-row table:style-name="ro1">
          <table:table-cell table:number-matrix-columns-spanned="2" table:number-matrix-rows-spanned="4" table:formula="of:=COM.EXAMPLE.CENSUS.CENSUSIMPL.CENSUSGET(2022;&quot;acs/acs5&quot;;&quot;NAME,B01003_001E&quot;;&quot;state:06,36,48&quot;)"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matrix-columns-spanned="3" table:number-matrix-rows-spanned="4" table:formula="of:=COM.EXAMPLE.CENSUS.CENSUSIMPL.CENSUSGET(2022;&quot;acs/acs5&quot;;&quot;NAME,B01003_001E&quot;;&quot;state:06,36,48&quot;; ;[.A2])" office:value-type="string" office:string-value="NAME" calcext:value-type="string">
            <text:p>NAME</text:p>
          </table:table-cell>
          <table:table-cell office:value-type="string" office:string-value="B01003_001E" calcext:value-type="string">
            <text:p>B01003_001E</text:p>
          </table:table-cell>
          <table:table-cell office:value-type="string" office:string-value="state" calcext:value-type="string">
            <text:p>state</text:p>
          </table:table-cell>
          <table:table-cell/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California" calcext:value-type="string">
            <text:p>California</text:p>
          </table:table-cell>
          <table:table-cell office:value-type="string" office:string-value="39356104" calcext:value-type="string">
            <text:p>39356104</text:p>
          </table:table-cell>
          <table:table-cell office:value-type="string" office:string-value="06" calcext:value-type="string">
            <text:p>06</text:p>
          </table:table-cell>
          <table:table-cell/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New York" calcext:value-type="string">
            <text:p>New York</text:p>
          </table:table-cell>
          <table:table-cell office:value-type="string" office:string-value="19994379" calcext:value-type="string">
            <text:p>19994379</text:p>
          </table:table-cell>
          <table:table-cell office:value-type="string" office:string-value="36" calcext:value-type="string">
            <text:p>36</text:p>
          </table:table-cell>
          <table:table-cell/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Texas" calcext:value-type="string">
            <text:p>Texas</text:p>
          </table:table-cell>
          <table:table-cell office:value-type="string" office:string-value="29243342" calcext:value-type="string">
            <text:p>29243342</text:p>
          </table:table-cell>
          <table:table-cell office:value-type="string" office:string-value="48" calcext:value-type="string">
            <text:p>4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ENSUS_GET with in_geography (array formula, every California county)</text:p>
          </table:table-cell>
          <table:table-cell table:number-columns-repeated="5"/>
        </table:table-row>
        <table:table-row table:style-name="ro1">
          <table:table-cell table:number-matrix-columns-spanned="2" table:number-matrix-rows-spanned="59" table:formula="of:=COM.EXAMPLE.CENSUS.CENSUSIMPL.CENSUSGET(2022;&quot;acs/acs5&quot;;&quot;NAME,B01003_001E&quot;;&quot;county:*&quot;;&quot;state:06&quot;)"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matrix-columns-spanned="4" table:number-matrix-rows-spanned="59" table:formula="of:=COM.EXAMPLE.CENSUS.CENSUSIMPL.CENSUSGET(2022;&quot;acs/acs5&quot;;&quot;NAME,B01003_001E&quot;;&quot;county:*&quot;;&quot;state:06&quot;;[.A2])" office:value-type="string" office:string-value="NAME" calcext:value-type="string">
            <text:p>NAME</text:p>
          </table:table-cell>
          <table:table-cell office:value-type="string" office:string-value="B01003_001E" calcext:value-type="string">
            <text:p>B01003_001E</text:p>
          </table:table-cell>
          <table:table-cell office:value-type="string" office:string-value="state" calcext:value-type="string">
            <text:p>state</text:p>
          </table:table-cell>
          <table:table-cell office:value-type="string" office:string-value="county" calcext:value-type="string">
            <text:p>county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Alameda County, California" calcext:value-type="string">
            <text:p>Alameda County, California</text:p>
          </table:table-cell>
          <table:table-cell office:value-type="string" office:string-value="1663823" calcext:value-type="string">
            <text:p>1663823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01" calcext:value-type="string">
            <text:p>001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Alpine County, California" calcext:value-type="string">
            <text:p>Alpine County, California</text:p>
          </table:table-cell>
          <table:table-cell office:value-type="string" office:string-value="1515" calcext:value-type="string">
            <text:p>1515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03" calcext:value-type="string">
            <text:p>003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Amador County, California" calcext:value-type="string">
            <text:p>Amador County, California</text:p>
          </table:table-cell>
          <table:table-cell office:value-type="string" office:string-value="40577" calcext:value-type="string">
            <text:p>40577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05" calcext:value-type="string">
            <text:p>005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Butte County, California" calcext:value-type="string">
            <text:p>Butte County, California</text:p>
          </table:table-cell>
          <table:table-cell office:value-type="string" office:string-value="213605" calcext:value-type="string">
            <text:p>213605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07" calcext:value-type="string">
            <text:p>007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Calaveras County, California" calcext:value-type="string">
            <text:p>Calaveras County, California</text:p>
          </table:table-cell>
          <table:table-cell office:value-type="string" office:string-value="45674" calcext:value-type="string">
            <text:p>45674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09" calcext:value-type="string">
            <text:p>009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Colusa County, California" calcext:value-type="string">
            <text:p>Colusa County, California</text:p>
          </table:table-cell>
          <table:table-cell office:value-type="string" office:string-value="21811" calcext:value-type="string">
            <text:p>21811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11" calcext:value-type="string">
            <text:p>011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Contra Costa County, California" calcext:value-type="string">
            <text:p>Contra Costa County, California</text:p>
          </table:table-cell>
          <table:table-cell office:value-type="string" office:string-value="1162648" calcext:value-type="string">
            <text:p>1162648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13" calcext:value-type="string">
            <text:p>013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Del Norte County, California" calcext:value-type="string">
            <text:p>Del Norte County, California</text:p>
          </table:table-cell>
          <table:table-cell office:value-type="string" office:string-value="27462" calcext:value-type="string">
            <text:p>27462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15" calcext:value-type="string">
            <text:p>015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El Dorado County, California" calcext:value-type="string">
            <text:p>El Dorado County, California</text:p>
          </table:table-cell>
          <table:table-cell office:value-type="string" office:string-value="191713" calcext:value-type="string">
            <text:p>191713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17" calcext:value-type="string">
            <text:p>017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Fresno County, California" calcext:value-type="string">
            <text:p>Fresno County, California</text:p>
          </table:table-cell>
          <table:table-cell office:value-type="string" office:string-value="1008280" calcext:value-type="string">
            <text:p>1008280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19" calcext:value-type="string">
            <text:p>019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Glenn County, California" calcext:value-type="string">
            <text:p>Glenn County, California</text:p>
          </table:table-cell>
          <table:table-cell office:value-type="string" office:string-value="28657" calcext:value-type="string">
            <text:p>28657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21" calcext:value-type="string">
            <text:p>021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Humboldt County, California" calcext:value-type="string">
            <text:p>Humboldt County, California</text:p>
          </table:table-cell>
          <table:table-cell office:value-type="string" office:string-value="136132" calcext:value-type="string">
            <text:p>136132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23" calcext:value-type="string">
            <text:p>023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Imperial County, California" calcext:value-type="string">
            <text:p>Imperial County, California</text:p>
          </table:table-cell>
          <table:table-cell office:value-type="string" office:string-value="179578" calcext:value-type="string">
            <text:p>179578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25" calcext:value-type="string">
            <text:p>025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Inyo County, California" calcext:value-type="string">
            <text:p>Inyo County, California</text:p>
          </table:table-cell>
          <table:table-cell office:value-type="string" office:string-value="18829" calcext:value-type="string">
            <text:p>18829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27" calcext:value-type="string">
            <text:p>027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Kern County, California" calcext:value-type="string">
            <text:p>Kern County, California</text:p>
          </table:table-cell>
          <table:table-cell office:value-type="string" office:string-value="906883" calcext:value-type="string">
            <text:p>906883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29" calcext:value-type="string">
            <text:p>029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Kings County, California" calcext:value-type="string">
            <text:p>Kings County, California</text:p>
          </table:table-cell>
          <table:table-cell office:value-type="string" office:string-value="152515" calcext:value-type="string">
            <text:p>152515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31" calcext:value-type="string">
            <text:p>031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Lake County, California" calcext:value-type="string">
            <text:p>Lake County, California</text:p>
          </table:table-cell>
          <table:table-cell office:value-type="string" office:string-value="68024" calcext:value-type="string">
            <text:p>68024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33" calcext:value-type="string">
            <text:p>033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Lassen County, California" calcext:value-type="string">
            <text:p>Lassen County, California</text:p>
          </table:table-cell>
          <table:table-cell office:value-type="string" office:string-value="31873" calcext:value-type="string">
            <text:p>31873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35" calcext:value-type="string">
            <text:p>035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Los Angeles County, California" calcext:value-type="string">
            <text:p>Los Angeles County, California</text:p>
          </table:table-cell>
          <table:table-cell office:value-type="string" office:string-value="9936690" calcext:value-type="string">
            <text:p>9936690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37" calcext:value-type="string">
            <text:p>037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Madera County, California" calcext:value-type="string">
            <text:p>Madera County, California</text:p>
          </table:table-cell>
          <table:table-cell office:value-type="string" office:string-value="157243" calcext:value-type="string">
            <text:p>157243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39" calcext:value-type="string">
            <text:p>039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Marin County, California" calcext:value-type="string">
            <text:p>Marin County, California</text:p>
          </table:table-cell>
          <table:table-cell office:value-type="string" office:string-value="260485" calcext:value-type="string">
            <text:p>260485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41" calcext:value-type="string">
            <text:p>041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Mariposa County, California" calcext:value-type="string">
            <text:p>Mariposa County, California</text:p>
          </table:table-cell>
          <table:table-cell office:value-type="string" office:string-value="17130" calcext:value-type="string">
            <text:p>17130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43" calcext:value-type="string">
            <text:p>043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Mendocino County, California" calcext:value-type="string">
            <text:p>Mendocino County, California</text:p>
          </table:table-cell>
          <table:table-cell office:value-type="string" office:string-value="91145" calcext:value-type="string">
            <text:p>91145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45" calcext:value-type="string">
            <text:p>045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Merced County, California" calcext:value-type="string">
            <text:p>Merced County, California</text:p>
          </table:table-cell>
          <table:table-cell office:value-type="string" office:string-value="282290" calcext:value-type="string">
            <text:p>282290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47" calcext:value-type="string">
            <text:p>047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Modoc County, California" calcext:value-type="string">
            <text:p>Modoc County, California</text:p>
          </table:table-cell>
          <table:table-cell office:value-type="string" office:string-value="8651" calcext:value-type="string">
            <text:p>8651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49" calcext:value-type="string">
            <text:p>049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Mono County, California" calcext:value-type="string">
            <text:p>Mono County, California</text:p>
          </table:table-cell>
          <table:table-cell office:value-type="string" office:string-value="13219" calcext:value-type="string">
            <text:p>13219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51" calcext:value-type="string">
            <text:p>051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Monterey County, California" calcext:value-type="string">
            <text:p>Monterey County, California</text:p>
          </table:table-cell>
          <table:table-cell office:value-type="string" office:string-value="437609" calcext:value-type="string">
            <text:p>437609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53" calcext:value-type="string">
            <text:p>053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Napa County, California" calcext:value-type="string">
            <text:p>Napa County, California</text:p>
          </table:table-cell>
          <table:table-cell office:value-type="string" office:string-value="137384" calcext:value-type="string">
            <text:p>137384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55" calcext:value-type="string">
            <text:p>055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Nevada County, California" calcext:value-type="string">
            <text:p>Nevada County, California</text:p>
          </table:table-cell>
          <table:table-cell office:value-type="string" office:string-value="102322" calcext:value-type="string">
            <text:p>102322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57" calcext:value-type="string">
            <text:p>057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Orange County, California" calcext:value-type="string">
            <text:p>Orange County, California</text:p>
          </table:table-cell>
          <table:table-cell office:value-type="string" office:string-value="3175227" calcext:value-type="string">
            <text:p>3175227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59" calcext:value-type="string">
            <text:p>059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Placer County, California" calcext:value-type="string">
            <text:p>Placer County, California</text:p>
          </table:table-cell>
          <table:table-cell office:value-type="string" office:string-value="406608" calcext:value-type="string">
            <text:p>406608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61" calcext:value-type="string">
            <text:p>061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Plumas County, California" calcext:value-type="string">
            <text:p>Plumas County, California</text:p>
          </table:table-cell>
          <table:table-cell office:value-type="string" office:string-value="19650" calcext:value-type="string">
            <text:p>19650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63" calcext:value-type="string">
            <text:p>063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Riverside County, California" calcext:value-type="string">
            <text:p>Riverside County, California</text:p>
          </table:table-cell>
          <table:table-cell office:value-type="string" office:string-value="2429487" calcext:value-type="string">
            <text:p>2429487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65" calcext:value-type="string">
            <text:p>065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Sacramento County, California" calcext:value-type="string">
            <text:p>Sacramento County, California</text:p>
          </table:table-cell>
          <table:table-cell office:value-type="string" office:string-value="1579211" calcext:value-type="string">
            <text:p>1579211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67" calcext:value-type="string">
            <text:p>067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San Benito County, California" calcext:value-type="string">
            <text:p>San Benito County, California</text:p>
          </table:table-cell>
          <table:table-cell office:value-type="string" office:string-value="64753" calcext:value-type="string">
            <text:p>64753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69" calcext:value-type="string">
            <text:p>069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San Bernardino County, California" calcext:value-type="string">
            <text:p>San Bernardino County, California</text:p>
          </table:table-cell>
          <table:table-cell office:value-type="string" office:string-value="2180563" calcext:value-type="string">
            <text:p>2180563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71" calcext:value-type="string">
            <text:p>071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San Diego County, California" calcext:value-type="string">
            <text:p>San Diego County, California</text:p>
          </table:table-cell>
          <table:table-cell office:value-type="string" office:string-value="3289701" calcext:value-type="string">
            <text:p>3289701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73" calcext:value-type="string">
            <text:p>073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San Francisco County, California" calcext:value-type="string">
            <text:p>San Francisco County, California</text:p>
          </table:table-cell>
          <table:table-cell office:value-type="string" office:string-value="851036" calcext:value-type="string">
            <text:p>851036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75" calcext:value-type="string">
            <text:p>075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San Joaquin County, California" calcext:value-type="string">
            <text:p>San Joaquin County, California</text:p>
          </table:table-cell>
          <table:table-cell office:value-type="string" office:string-value="779445" calcext:value-type="string">
            <text:p>779445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77" calcext:value-type="string">
            <text:p>077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San Luis Obispo County, California" calcext:value-type="string">
            <text:p>San Luis Obispo County, California</text:p>
          </table:table-cell>
          <table:table-cell office:value-type="string" office:string-value="281712" calcext:value-type="string">
            <text:p>281712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79" calcext:value-type="string">
            <text:p>079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San Mateo County, California" calcext:value-type="string">
            <text:p>San Mateo County, California</text:p>
          </table:table-cell>
          <table:table-cell office:value-type="string" office:string-value="754250" calcext:value-type="string">
            <text:p>754250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81" calcext:value-type="string">
            <text:p>081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Santa Barbara County, California" calcext:value-type="string">
            <text:p>Santa Barbara County, California</text:p>
          </table:table-cell>
          <table:table-cell office:value-type="string" office:string-value="445213" calcext:value-type="string">
            <text:p>445213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83" calcext:value-type="string">
            <text:p>083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Santa Clara County, California" calcext:value-type="string">
            <text:p>Santa Clara County, California</text:p>
          </table:table-cell>
          <table:table-cell office:value-type="string" office:string-value="1916831" calcext:value-type="string">
            <text:p>1916831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85" calcext:value-type="string">
            <text:p>085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Santa Cruz County, California" calcext:value-type="string">
            <text:p>Santa Cruz County, California</text:p>
          </table:table-cell>
          <table:table-cell office:value-type="string" office:string-value="268571" calcext:value-type="string">
            <text:p>268571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87" calcext:value-type="string">
            <text:p>087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Shasta County, California" calcext:value-type="string">
            <text:p>Shasta County, California</text:p>
          </table:table-cell>
          <table:table-cell office:value-type="string" office:string-value="181852" calcext:value-type="string">
            <text:p>181852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89" calcext:value-type="string">
            <text:p>089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Sierra County, California" calcext:value-type="string">
            <text:p>Sierra County, California</text:p>
          </table:table-cell>
          <table:table-cell office:value-type="string" office:string-value="2916" calcext:value-type="string">
            <text:p>2916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91" calcext:value-type="string">
            <text:p>091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Siskiyou County, California" calcext:value-type="string">
            <text:p>Siskiyou County, California</text:p>
          </table:table-cell>
          <table:table-cell office:value-type="string" office:string-value="44049" calcext:value-type="string">
            <text:p>44049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93" calcext:value-type="string">
            <text:p>093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Solano County, California" calcext:value-type="string">
            <text:p>Solano County, California</text:p>
          </table:table-cell>
          <table:table-cell office:value-type="string" office:string-value="450995" calcext:value-type="string">
            <text:p>450995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95" calcext:value-type="string">
            <text:p>095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Sonoma County, California" calcext:value-type="string">
            <text:p>Sonoma County, California</text:p>
          </table:table-cell>
          <table:table-cell office:value-type="string" office:string-value="488436" calcext:value-type="string">
            <text:p>488436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97" calcext:value-type="string">
            <text:p>097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Stanislaus County, California" calcext:value-type="string">
            <text:p>Stanislaus County, California</text:p>
          </table:table-cell>
          <table:table-cell office:value-type="string" office:string-value="552063" calcext:value-type="string">
            <text:p>552063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99" calcext:value-type="string">
            <text:p>099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Sutter County, California" calcext:value-type="string">
            <text:p>Sutter County, California</text:p>
          </table:table-cell>
          <table:table-cell office:value-type="string" office:string-value="99101" calcext:value-type="string">
            <text:p>99101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101" calcext:value-type="string">
            <text:p>101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Tehama County, California" calcext:value-type="string">
            <text:p>Tehama County, California</text:p>
          </table:table-cell>
          <table:table-cell office:value-type="string" office:string-value="65484" calcext:value-type="string">
            <text:p>65484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103" calcext:value-type="string">
            <text:p>103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Trinity County, California" calcext:value-type="string">
            <text:p>Trinity County, California</text:p>
          </table:table-cell>
          <table:table-cell office:value-type="string" office:string-value="15889" calcext:value-type="string">
            <text:p>15889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105" calcext:value-type="string">
            <text:p>105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Tulare County, California" calcext:value-type="string">
            <text:p>Tulare County, California</text:p>
          </table:table-cell>
          <table:table-cell office:value-type="string" office:string-value="473446" calcext:value-type="string">
            <text:p>473446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107" calcext:value-type="string">
            <text:p>107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Tuolumne County, California" calcext:value-type="string">
            <text:p>Tuolumne County, California</text:p>
          </table:table-cell>
          <table:table-cell office:value-type="string" office:string-value="54993" calcext:value-type="string">
            <text:p>54993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109" calcext:value-type="string">
            <text:p>109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Ventura County, California" calcext:value-type="string">
            <text:p>Ventura County, California</text:p>
          </table:table-cell>
          <table:table-cell office:value-type="string" office:string-value="842009" calcext:value-type="string">
            <text:p>842009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111" calcext:value-type="string">
            <text:p>111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Yolo County, California" calcext:value-type="string">
            <text:p>Yolo County, California</text:p>
          </table:table-cell>
          <table:table-cell office:value-type="string" office:string-value="217141" calcext:value-type="string">
            <text:p>217141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113" calcext:value-type="string">
            <text:p>113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Yuba County, California" calcext:value-type="string">
            <text:p>Yuba County, California</text:p>
          </table:table-cell>
          <table:table-cell office:value-type="string" office:string-value="81705" calcext:value-type="string">
            <text:p>81705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115" calcext:value-type="string">
            <text:p>1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ENSUS_DATASETS (array formula, first 15 datasets for 2022)</text:p>
          </table:table-cell>
          <table:table-cell table:number-columns-repeated="5"/>
        </table:table-row>
        <table:table-row table:style-name="ro1">
          <table:table-cell table:number-matrix-columns-spanned="2" table:number-matrix-rows-spanned="16" table:formula="of:=COM.EXAMPLE.CENSUS.CENSUSIMPL.CENSUSDATASETS(2022)" office:value-type="string" office:string-value="Dataset" calcext:value-type="string">
            <text:p>Dataset</text:p>
          </table:table-cell>
          <table:table-cell office:value-type="string" office:string-value="Title" calcext:value-type="string">
            <text:p>Title</text:p>
          </table:table-cell>
          <table:table-cell office:value-type="string" calcext:value-type="string">
            <text:p>{=CENSUS_DATASETS(2022)} <text:s/>(select range, Ctrl+Shift+Enter)</text:p>
          </table:table-cell>
          <table:table-cell table:number-columns-repeated="3"/>
        </table:table-row>
        <table:table-row table:style-name="ro1">
          <table:table-cell office:value-type="string" office:string-value="acs/acs1" calcext:value-type="string">
            <text:p>acs/acs1</text:p>
          </table:table-cell>
          <table:table-cell office:value-type="string" office:string-value="American Community Survey: 1-Year Estimates: Detailed Tables 1-Year" calcext:value-type="string">
            <text:p>American Community Survey: 1-Year Estimates: Detailed Tables 1-Year</text:p>
          </table:table-cell>
          <table:table-cell table:number-columns-repeated="4"/>
        </table:table-row>
        <table:table-row table:style-name="ro1">
          <table:table-cell office:value-type="string" office:string-value="acs/acs1/pums" calcext:value-type="string">
            <text:p>acs/acs1/pums</text:p>
          </table:table-cell>
          <table:table-cell office:value-type="string" office:string-value="2022 American Community Survey: 1-Year Estimates - Public Use Microdata Sample" calcext:value-type="string">
            <text:p>2022 American Community Survey: 1-Year Estimates - Public Use Microdata Sample</text:p>
          </table:table-cell>
          <table:table-cell table:number-columns-repeated="4"/>
        </table:table-row>
        <table:table-row table:style-name="ro1">
          <table:table-cell office:value-type="string" office:string-value="acs/acs1/pumspr" calcext:value-type="string">
            <text:p>acs/acs1/pumspr</text:p>
          </table:table-cell>
          <table:table-cell office:value-type="string" office:string-value="2022 American Community Survey: 1-Year Estimates - Public Use Microdata Sample Puerto Rico" calcext:value-type="string">
            <text:p>2022 American Community Survey: 1-Year Estimates - Public Use Microdata Sample Puerto Rico</text:p>
          </table:table-cell>
          <table:table-cell table:number-columns-repeated="4"/>
        </table:table-row>
        <table:table-row table:style-name="ro1">
          <table:table-cell office:value-type="string" office:string-value="acs/acs1/spp" calcext:value-type="string">
            <text:p>acs/acs1/spp</text:p>
          </table:table-cell>
          <table:table-cell office:value-type="string" office:string-value="American Community Survey: 1-Year Estimates: Selected Population Profiles 1-Year" calcext:value-type="string">
            <text:p>American Community Survey: 1-Year Estimates: Selected Population Profiles 1-Year</text:p>
          </table:table-cell>
          <table:table-cell table:number-columns-repeated="4"/>
        </table:table-row>
        <table:table-row table:style-name="ro1">
          <table:table-cell office:value-type="string" office:string-value="acs/acs5" calcext:value-type="string">
            <text:p>acs/acs5</text:p>
          </table:table-cell>
          <table:table-cell office:value-type="string" office:string-value="American Community Survey: 5-Year Estimates: Detailed Tables 5-Year" calcext:value-type="string">
            <text:p>American Community Survey: 5-Year Estimates: Detailed Tables 5-Year</text:p>
          </table:table-cell>
          <table:table-cell table:number-columns-repeated="4"/>
        </table:table-row>
        <table:table-row table:style-name="ro1">
          <table:table-cell office:value-type="string" office:string-value="acs/acs1/cprofile" calcext:value-type="string">
            <text:p>acs/acs1/cprofile</text:p>
          </table:table-cell>
          <table:table-cell office:value-type="string" office:string-value="American Community Survey: 1-Year Estimates: Comparison Profiles 1-Year" calcext:value-type="string">
            <text:p>American Community Survey: 1-Year Estimates: Comparison Profiles 1-Year</text:p>
          </table:table-cell>
          <table:table-cell table:number-columns-repeated="4"/>
        </table:table-row>
        <table:table-row table:style-name="ro1">
          <table:table-cell office:value-type="string" office:string-value="acs/acs1/profile" calcext:value-type="string">
            <text:p>acs/acs1/profile</text:p>
          </table:table-cell>
          <table:table-cell office:value-type="string" office:string-value="American Community Survey: 1-Year Estimates: Data Profiles 1-Year" calcext:value-type="string">
            <text:p>American Community Survey: 1-Year Estimates: Data Profiles 1-Year</text:p>
          </table:table-cell>
          <table:table-cell table:number-columns-repeated="4"/>
        </table:table-row>
        <table:table-row table:style-name="ro1">
          <table:table-cell office:value-type="string" office:string-value="acs/acs1/subject" calcext:value-type="string">
            <text:p>acs/acs1/subject</text:p>
          </table:table-cell>
          <table:table-cell office:value-type="string" office:string-value="American Community Survey: 1-Year Estimates: Subject Tables 1-Year" calcext:value-type="string">
            <text:p>American Community Survey: 1-Year Estimates: Subject Tables 1-Year</text:p>
          </table:table-cell>
          <table:table-cell table:number-columns-repeated="4"/>
        </table:table-row>
        <table:table-row table:style-name="ro1">
          <table:table-cell office:value-type="string" office:string-value="acs/acs5/cprofile" calcext:value-type="string">
            <text:p>acs/acs5/cprofile</text:p>
          </table:table-cell>
          <table:table-cell office:value-type="string" office:string-value="American Community Survey: 5-Year Estimates: Comparison Profiles 5-Year" calcext:value-type="string">
            <text:p>American Community Survey: 5-Year Estimates: Comparison Profiles 5-Year</text:p>
          </table:table-cell>
          <table:table-cell table:number-columns-repeated="4"/>
        </table:table-row>
        <table:table-row table:style-name="ro1">
          <table:table-cell office:value-type="string" office:string-value="cps/basic/jul" calcext:value-type="string">
            <text:p>cps/basic/jul</text:p>
          </table:table-cell>
          <table:table-cell office:value-type="string" office:string-value="Current Population Survey: Basic Monthly" calcext:value-type="string">
            <text:p>Current Population Survey: Basic Monthly</text:p>
          </table:table-cell>
          <table:table-cell table:number-columns-repeated="4"/>
        </table:table-row>
        <table:table-row table:style-name="ro1">
          <table:table-cell office:value-type="string" office:string-value="acs/acs5/profile" calcext:value-type="string">
            <text:p>acs/acs5/profile</text:p>
          </table:table-cell>
          <table:table-cell office:value-type="string" office:string-value="American Community Survey: 5-Year Estimates: Data Profiles 5-Year" calcext:value-type="string">
            <text:p>American Community Survey: 5-Year Estimates: Data Profiles 5-Year</text:p>
          </table:table-cell>
          <table:table-cell table:number-columns-repeated="4"/>
        </table:table-row>
        <table:table-row table:style-name="ro1">
          <table:table-cell office:value-type="string" office:string-value="cps/basic/jun" calcext:value-type="string">
            <text:p>cps/basic/jun</text:p>
          </table:table-cell>
          <table:table-cell office:value-type="string" office:string-value="Current Population Survey: Basic Monthly" calcext:value-type="string">
            <text:p>Current Population Survey: Basic Monthly</text:p>
          </table:table-cell>
          <table:table-cell table:number-columns-repeated="4"/>
        </table:table-row>
        <table:table-row table:style-name="ro1">
          <table:table-cell office:value-type="string" office:string-value="acs/acs5/pums" calcext:value-type="string">
            <text:p>acs/acs5/pums</text:p>
          </table:table-cell>
          <table:table-cell office:value-type="string" office:string-value="2022 American Community Survey: 5-Year Estimates - Public Use Microdata Sample" calcext:value-type="string">
            <text:p>2022 American Community Survey: 5-Year Estimates - Public Use Microdata Sample</text:p>
          </table:table-cell>
          <table:table-cell table:number-columns-repeated="4"/>
        </table:table-row>
        <table:table-row table:style-name="ro1">
          <table:table-cell office:value-type="string" office:string-value="cps/basic/mar" calcext:value-type="string">
            <text:p>cps/basic/mar</text:p>
          </table:table-cell>
          <table:table-cell office:value-type="string" office:string-value="Current Population Survey: Basic Monthly" calcext:value-type="string">
            <text:p>Current Population Survey: Basic Monthly</text:p>
          </table:table-cell>
          <table:table-cell table:number-columns-repeated="4"/>
        </table:table-row>
        <table:table-row table:style-name="ro1">
          <table:table-cell office:value-type="string" office:string-value="acs/acs5/pumspr" calcext:value-type="string">
            <text:p>acs/acs5/pumspr</text:p>
          </table:table-cell>
          <table:table-cell office:value-type="string" office:string-value="2022 American Community Survey: 5-Year Estimates - Public Use Microdata Sample Puerto Rico" calcext:value-type="string">
            <text:p>2022 American Community Survey: 5-Year Estimates - Public Use Microdata Sample Puerto Ric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 style:data-style-name="N2" text:time-value="20:33:32.6909529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0T20:28:28.919310341</meta:creation-date>
    <dc:date>2026-07-10T20:37:18.196201136</dc:date>
    <meta:editing-duration>PT7M4S</meta:editing-duration>
    <meta:editing-cycles>3</meta:editing-cycles>
    <meta:generator>LibreOffice/26.2.4.2$Linux_X86_64 LibreOffice_project/620$Build-2</meta:generator>
    <meta:document-statistic meta:table-count="1" meta:cell-count="425" meta:object-count="0"/>
  </office:meta>
</office:document-meta>
</file>